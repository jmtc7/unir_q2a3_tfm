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15ccf0" officeooo:paragraph-rsid="0015ccf0"/>
    </style:style>
    <style:style style:name="P2" style:family="paragraph" style:parent-style-name="Standard">
      <style:text-properties officeooo:rsid="0015ccf0" officeooo:paragraph-rsid="00178978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5ccf0" officeooo:paragraph-rsid="0015ccf0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800ce" officeooo:paragraph-rsid="001800ce"/>
    </style:style>
    <style:style style:name="P5" style:family="paragraph" style:parent-style-name="Standard" style:list-style-name="L1">
      <style:text-properties officeooo:rsid="0015ccf0" officeooo:paragraph-rsid="0015ccf0"/>
    </style:style>
    <style:style style:name="P6" style:family="paragraph" style:parent-style-name="Standard" style:list-style-name="L1">
      <style:text-properties officeooo:rsid="0015ccf0" officeooo:paragraph-rsid="0019ed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00ce" style:font-weight-asian="bold" style:font-weight-complex="bold"/>
    </style:style>
    <style:style style:name="T3" style:family="text">
      <style:text-properties officeooo:rsid="00182965"/>
    </style:style>
    <style:style style:name="T4" style:family="text">
      <style:text-properties officeooo:rsid="0019ed9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e de Incidencia</text:p>
      <text:p text:style-name="P1"/>
      <text:p text:style-name="P1"><text:span text:style-name="T1">Fecha </text:span><text:span text:style-name="T2">(AAAA-MM-DD)</text:span>: </text:p>
      <text:p text:style-name="P1"/>
      <text:p text:style-name="P1"/>
      <text:p text:style-name="P4"><text:span text:style-name="T1">Hora (HH:MM)</text:span>: </text:p>
      <text:p text:style-name="P1"/>
      <text:p text:style-name="P1"/>
      <text:p text:style-name="P1"><text:span text:style-name="T1">Máquina</text:span>: </text:p>
      <text:p text:style-name="P1"/>
      <text:p text:style-name="P1"/>
      <text:p text:style-name="P1"><text:span text:style-name="T1">Nombre del operario</text:span>: </text:p>
      <text:p text:style-name="P1"/>
      <text:p text:style-name="P1"/>
      <text:p text:style-name="P1"><text:span text:style-name="T1">Descripción del problema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/>
      <text:p text:style-name="P1"><text:span text:style-name="T1">Valores de las variables*</text:span>:</text:p>
      <text:list xml:id="list1130193322" text:style-name="L1">
        <text:list-item>
          <text:p text:style-name="P5">Presiones:</text:p>
          <text:list>
            <text:list-item>
              <text:p text:style-name="P5">TP2 del compresor: </text:p>
            </text:list-item>
            <text:list-item>
              <text:p text:style-name="P5">TP3 del panel neumático: </text:p>
            </text:list-item>
            <text:list-item>
              <text:p text:style-name="P5">H1 al descargar el filtro ciclónico: </text:p>
            </text:list-item>
            <text:list-item>
              <text:p text:style-name="P5">DV al descargar los secadores: </text:p>
            </text:list-item>
            <text:list-item>
              <text:p text:style-name="P5">R del depósito: </text:p>
            </text:list-item>
          </text:list>
        </text:list-item>
        <text:list-item>
          <text:p text:style-name="P5">Señales eléctricas:</text:p>
          <text:list>
            <text:list-item>
              <text:p text:style-name="P5">COMP: </text:p>
            </text:list-item>
            <text:list-item>
              <text:p text:style-name="P5">DV electric: </text:p>
            </text:list-item>
            <text:list-item>
              <text:p text:style-name="P5">TOWERS: </text:p>
            </text:list-item>
            <text:list-item>
              <text:p text:style-name="P5">MPG: </text:p>
            </text:list-item>
            <text:list-item>
              <text:p text:style-name="P5">LPS: </text:p>
            </text:list-item>
            <text:list-item>
              <text:p text:style-name="P5">Pressur<text:span text:style-name="T3">e</text:span> Switch: </text:p>
            </text:list-item>
            <text:list-item>
              <text:p text:style-name="P5">Oil Level: </text:p>
            </text:list-item>
          </text:list>
        </text:list-item>
        <text:list-item>
          <text:p text:style-name="P6">Corriente del motor: </text:p>
        </text:list-item>
        <text:list-item>
          <text:p text:style-name="P6">Temperatura del aceite: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* Indicar las presiones en bares (bar), la corriente en amperios (A), la temperatura en grados centígrados (ºC). <text:span text:style-name="T4">Para las</text:span> señales eléctricas, <text:span text:style-name="T4">utilizar “</text:span>1” <text:span text:style-name="T4">si está </text:span>encendid<text:span text:style-name="T4">a</text:span> <text:span text:style-name="T4">y “</text:span>0” <text:span text:style-name="T4">si está </text:span>apagad<text:span text:style-name="T4">a</text:span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3:34:57.183491519</meta:creation-date>
    <dc:date>2026-05-19T15:09:13.929773026</dc:date>
    <meta:editing-duration>PT44M50S</meta:editing-duration>
    <meta:editing-cycles>9</meta:editing-cycles>
    <meta:generator>LibreOffice/7.3.7.2$Linux_X86_64 LibreOffice_project/30$Build-2</meta:generator>
    <meta:document-statistic meta:table-count="2" meta:image-count="0" meta:object-count="0" meta:page-count="1" meta:paragraph-count="24" meta:word-count="106" meta:character-count="614" meta:non-whitespace-character-count="530"/>
  </office:meta>
</office:document-meta>
</file>