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4979in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text-properties officeooo:rsid="0015ccf0" officeooo:paragraph-rsid="0015ccf0"/>
    </style:style>
    <style:style style:name="P2" style:family="paragraph" style:parent-style-name="Standard">
      <style:text-properties officeooo:rsid="0015ccf0" officeooo:paragraph-rsid="00178978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5ccf0" officeooo:paragraph-rsid="0015ccf0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text-properties officeooo:rsid="0015ccf0" officeooo:paragraph-rsid="0015ccf0"/>
    </style:style>
    <style:style style:name="P5" style:family="paragraph" style:parent-style-name="Standard" style:list-style-name="L1">
      <style:text-properties officeooo:rsid="0015ccf0" officeooo:paragraph-rsid="0019ed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00ce" style:font-weight-asian="bold" style:font-weight-complex="bold"/>
    </style:style>
    <style:style style:name="T3" style:family="text">
      <style:text-properties fo:font-weight="bold" officeooo:rsid="0022ad0e" style:font-weight-asian="bold" style:font-weight-complex="bold"/>
    </style:style>
    <style:style style:name="T4" style:family="text">
      <style:text-properties officeooo:rsid="00182965"/>
    </style:style>
    <style:style style:name="T5" style:family="text">
      <style:text-properties officeooo:rsid="0019ed95"/>
    </style:style>
    <style:style style:name="T6" style:family="text">
      <style:text-properties officeooo:rsid="001800ce"/>
    </style:style>
    <style:style style:name="T7" style:family="text">
      <style:text-properties officeooo:rsid="00242e5f"/>
    </style:style>
    <style:style style:name="T8" style:family="text">
      <style:text-properties officeooo:rsid="0025a83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orte de Incidencia</text:p>
      <text:p text:style-name="P1"/>
      <text:p text:style-name="P1"><text:span text:style-name="T1">Fecha </text:span><text:span text:style-name="T2">(AAAA-MM-DD)</text:span>: <text:span text:style-name="T6"><text:s/></text:span></text:p>
      <text:p text:style-name="P1"/>
      <text:p text:style-name="P1"/>
      <text:p text:style-name="P1"><text:span text:style-name="T1">Máquina </text:span><text:span text:style-name="T3">problemática</text:span>: </text:p>
      <text:p text:style-name="P1"/>
      <text:p text:style-name="P1"/>
      <text:p text:style-name="P1"><text:span text:style-name="T1">Nombre del operario</text:span>: </text:p>
      <text:p text:style-name="P1"/>
      <text:p text:style-name="P1"/>
      <text:p text:style-name="P1"><text:span text:style-name="T1">Descripción del problema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  <text:p text:style-name="P1"/>
      <text:p text:style-name="P1"><text:span text:style-name="T1">Valores de las variables*</text:span>:</text:p>
      <text:list xml:id="list1543789905" text:style-name="L1">
        <text:list-item>
          <text:p text:style-name="P4">Presiones:</text:p>
          <text:list>
            <text:list-item>
              <text:p text:style-name="P4"><text:span text:style-name="T8">D</text:span>el compresor <text:span text:style-name="T8">(TP2)</text:span>: </text:p>
            </text:list-item>
            <text:list-item>
              <text:p text:style-name="P4"><text:span text:style-name="T8">D</text:span>el panel neumático <text:span text:style-name="T8">(TP3)</text:span>: </text:p>
            </text:list-item>
            <text:list-item>
              <text:p text:style-name="P4"><text:span text:style-name="T8">A</text:span>l descargar el filtro ciclónico <text:span text:style-name="T8">(H1)</text:span>: </text:p>
            </text:list-item>
            <text:list-item>
              <text:p text:style-name="P4"><text:span text:style-name="T8">A</text:span>l descargar los secadores <text:span text:style-name="T8">(DV)</text:span>: </text:p>
            </text:list-item>
            <text:list-item>
              <text:p text:style-name="P4"><text:span text:style-name="T8">D</text:span>el depósito <text:span text:style-name="T7">de aire </text:span><text:span text:style-name="T8">(R)</text:span>: </text:p>
            </text:list-item>
          </text:list>
        </text:list-item>
        <text:list-item>
          <text:p text:style-name="P4">Señales eléctricas:</text:p>
          <text:list>
            <text:list-item>
              <text:p text:style-name="P4">COMP: </text:p>
            </text:list-item>
            <text:list-item>
              <text:p text:style-name="P4">DV electric: </text:p>
            </text:list-item>
            <text:list-item>
              <text:p text:style-name="P4">TOWERS: </text:p>
            </text:list-item>
            <text:list-item>
              <text:p text:style-name="P4">MPG: </text:p>
            </text:list-item>
            <text:list-item>
              <text:p text:style-name="P4">LPS: </text:p>
            </text:list-item>
            <text:list-item>
              <text:p text:style-name="P4">Pressur<text:span text:style-name="T4">e</text:span> Switch: </text:p>
            </text:list-item>
            <text:list-item>
              <text:p text:style-name="P4">Oil Level: </text:p>
            </text:list-item>
          </text:list>
        </text:list-item>
        <text:list-item>
          <text:p text:style-name="P5">Corriente del motor: </text:p>
        </text:list-item>
        <text:list-item>
          <text:p text:style-name="P5">Temperatura del aceite: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* Indicar las presiones en bares (bar), la corriente en amperios (A), la temperatura en grados centígrados (ºC). <text:span text:style-name="T5">Para las</text:span> señales eléctricas, <text:span text:style-name="T5">utilizar “</text:span>1” <text:span text:style-name="T5">si está </text:span>encendid<text:span text:style-name="T5">a</text:span> <text:span text:style-name="T5">y “</text:span>0” <text:span text:style-name="T5">si está </text:span>apagad<text:span text:style-name="T5">a</text:span>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13:34:57.183491519</meta:creation-date>
    <dc:date>2026-05-19T21:27:48.041109085</dc:date>
    <meta:editing-duration>PT49M17S</meta:editing-duration>
    <meta:editing-cycles>12</meta:editing-cycles>
    <meta:generator>LibreOffice/7.3.7.2$Linux_X86_64 LibreOffice_project/30$Build-2</meta:generator>
    <meta:document-statistic meta:table-count="2" meta:image-count="0" meta:object-count="0" meta:page-count="1" meta:paragraph-count="23" meta:word-count="107" meta:character-count="632" meta:non-whitespace-character-count="546"/>
  </office:meta>
</office:document-meta>
</file>